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e5c" officeooo:paragraph-rsid="000f9e5c"/>
    </style:style>
    <style:style style:name="P2" style:family="paragraph" style:parent-style-name="Standard">
      <style:text-properties officeooo:rsid="000f9e5c" officeooo:paragraph-rsid="0010606d"/>
    </style:style>
    <style:style style:name="P3" style:family="paragraph" style:parent-style-name="Standard">
      <style:text-properties officeooo:rsid="0012f12d" officeooo:paragraph-rsid="0012f12d"/>
    </style:style>
    <style:style style:name="P4" style:family="paragraph" style:parent-style-name="Standard">
      <style:text-properties officeooo:rsid="000f9e5c" officeooo:paragraph-rsid="001590c6"/>
    </style:style>
    <style:style style:name="P5" style:family="paragraph" style:parent-style-name="Standard">
      <style:text-properties officeooo:rsid="001590c6" officeooo:paragraph-rsid="001590c6"/>
    </style:style>
    <style:style style:name="P6" style:family="paragraph" style:parent-style-name="Text_20_body">
      <style:text-properties officeooo:paragraph-rsid="001590c6"/>
    </style:style>
    <style:style style:name="T1" style:family="text">
      <style:text-properties officeooo:rsid="001105d2"/>
    </style:style>
    <style:style style:name="T2" style:family="text">
      <style:text-properties officeooo:rsid="0012f12d"/>
    </style:style>
    <style:style style:name="T3" style:family="text">
      <style:text-properties officeooo:rsid="001590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0.<text:span text:style-name="T3">3</text:span>.0.<text:span text:style-name="T1">3</text:span></text:p>
      <text:p text:style-name="P1">Pour mettre à jour, il vous suffit de cliquer sur le lien « AstroTargetSelector » ci-dessous. Pas besoin de désinstaller la version précédente, c’est automatique.</text:p>
      <text:p text:style-name="P1"/>
      <text:p text:style-name="P1">Release Note :</text:p>
      <text:p text:style-name="P1"/>
      <text:p text:style-name="P6">- Mer<text:span text:style-name="T3">c</text:span>i à @<text:span text:style-name="T3">Kilkias Ballot et @Mickaelle Nobilet</text:span> :<text:line-break/> <text:span text:style-name="T2">Ajout d’une fonctionnalité : Afficher l’objet dans </text:span><text:span text:style-name="T3">Cartes du Ciel.<text:line-break/>Pas de problème de version … je dis ca je dis rien, hein Messieurs Dames de Stellarium:p </text:span><text:span text:style-name="T2"><text:s/></text:span></text:p>
      <text:p text:style-name="P4">- <text:span text:style-name="T3">Merci à @Jojo SbrCoach</text:span></text:p>
      <text:p text:style-name="P5">Correction du tri de la liste pour les données de type Coordinate.</text:p>
      <text:p text:style-name="P5">Modification des TabIndex et TabStop</text:p>
      <text:p text:style-name="P5"/>
      <text:p text:style-name="P5">- Correction mineure :</text:p>
      <text:p text:style-name="P5">Passage des messages d’erreur de saisie du type error à warning dans les paramètres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5T12:32:34.770000000</meta:creation-date>
    <dc:date>2022-08-12T18:54:49.034000000</dc:date>
    <meta:editing-duration>PT28M44S</meta:editing-duration>
    <meta:editing-cycles>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9" meta:word-count="106" meta:character-count="630" meta:non-whitespace-character-count="530"/>
  </office:meta>
</office:document-meta>
</file>