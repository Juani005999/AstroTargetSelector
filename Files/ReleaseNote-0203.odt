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e5c" officeooo:paragraph-rsid="000f9e5c"/>
    </style:style>
    <style:style style:name="P2" style:family="paragraph" style:parent-style-name="Standard">
      <style:text-properties officeooo:rsid="000f9e5c" officeooo:paragraph-rsid="0010606d"/>
    </style:style>
    <style:style style:name="P3" style:family="paragraph" style:parent-style-name="Standard">
      <style:text-properties officeooo:rsid="000f9e5c" officeooo:paragraph-rsid="0012f12d"/>
    </style:style>
    <style:style style:name="P4" style:family="paragraph" style:parent-style-name="Standard">
      <style:text-properties officeooo:rsid="000f9e5c" officeooo:paragraph-rsid="0010606d"/>
    </style:style>
    <style:style style:name="P5" style:family="paragraph" style:parent-style-name="Standard">
      <style:text-properties officeooo:rsid="0012f12d" officeooo:paragraph-rsid="0012f12d"/>
    </style:style>
    <style:style style:name="T1" style:family="text">
      <style:text-properties officeooo:rsid="001105d2"/>
    </style:style>
    <style:style style:name="T2" style:family="text">
      <style:text-properties officeooo:rsid="0012f1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0.<text:span text:style-name="T1">2</text:span>.0.<text:span text:style-name="T1">3</text:span></text:p>
      <text:p text:style-name="P1">Pour mettre à jour, il vous suffit de cliquer sur le lien « AstroTargetSelector » ci-dessous. Pas besoin de désinstaller la version précédente, c’est automatique.</text:p>
      <text:p text:style-name="P1"/>
      <text:p text:style-name="P1">Release Note :</text:p>
      <text:p text:style-name="P1"/>
      <text:p text:style-name="P3">- Mer<text:span text:style-name="T2">f</text:span>i à @Maxime Goyard :</text:p>
      <text:p text:style-name="P1"><text:span text:style-name="T2">Mofification du lifélé du boufon « Mofifier »</text:span>.</text:p>
      <text:p text:style-name="P2"/>
      <text:p text:style-name="P2">- <text:span text:style-name="T2">Ajout d’une fonctionnalité : Afficher l’objet dans Stellarium:)</text:span></text:p>
      <text:p text:style-name="P5">Cette fonctionnalité nécessite la configuration du plugin « Contrôle à Distance » dans Stellarium.</text:p>
      <text:p text:style-name="P2"><text:span text:style-name="T2">Des explications vous seront fournis dans le groupe FB</text:span>.</text:p>
      <text:p text:style-name="P5">Attention, nous avons détecté une régression dans Stellarium et cette fonctionnalité n’est pas disponible pour les versions 0.22.X de Stellarium. Nous vous conseillons les versions 0.21.X maximum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5T12:32:34.770000000</meta:creation-date>
    <dc:date>2022-08-09T18:21:52.223000000</dc:date>
    <meta:editing-duration>PT12M50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9" meta:word-count="103" meta:character-count="677" meta:non-whitespace-character-count="583"/>
  </office:meta>
</office:document-meta>
</file>