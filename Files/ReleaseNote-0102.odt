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e5c" officeooo:paragraph-rsid="000f9e5c"/>
    </style:style>
    <style:style style:name="P2" style:family="paragraph" style:parent-style-name="Standard">
      <style:text-properties officeooo:rsid="000f9e5c" officeooo:paragraph-rsid="001060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.1.0.2</text:p>
      <text:p text:style-name="P1">Pour mettre à jour, il vous suffit de cliquer sur le lien « AstroTargetSelector » ci-dessous. Pas besoin de désinstaller la version précédente, c’est automatique.</text:p>
      <text:p text:style-name="P1"/>
      <text:p text:style-name="P1">Release Note :</text:p>
      <text:p text:style-name="P1"/>
      <text:p text:style-name="P1">- Merci à @Andere Wereld :</text:p>
      <text:p text:style-name="P1">Correction de bug : Mauvaise prise en compte des formats internationaux lors de la lecture des données dans le fichier de configuration des objets célestes.</text:p>
      <text:p text:style-name="P2"/>
      <text:p text:style-name="P2">- Merci à @Kikias Ballot, @Maxime Goyard et Yann Brelivet</text:p>
      <text:p text:style-name="P2">Ajout ou modification de capteurs dans le fichier de configuration des capteurs.</text:p>
      <text:p text:style-name="P2">Intégration de ce nouveau fichier de configuration dans l’installeur.</text:p>
      <text:p text:style-name="P2"/>
      <text:p text:style-name="P1">- Ajout de données complémentaires dans les logs lors d’une erreur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2:32:34.770000000</meta:creation-date>
    <dc:date>2022-08-05T12:41:42.879000000</dc:date>
    <meta:editing-duration>PT9M7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9" meta:word-count="103" meta:character-count="646" meta:non-whitespace-character-count="552"/>
  </office:meta>
</office:document-meta>
</file>