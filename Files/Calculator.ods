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56.06" calcext:value-type="float">
            <text:p>56,06</text:p>
          </table:table-cell>
        </table:table-row>
        <table:table-row table:style-name="ro1">
          <table:table-cell/>
          <table:table-cell table:formula="of:=([.B4]+[.C4]/60+[.D4]/3600)" office:value-type="float" office:value="14.7489055555556" calcext:value-type="float">
            <text:p>14,748905555555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3.1" calcext:value-type="float">
            <text:p>23,1</text:p>
          </table:table-cell>
        </table:table-row>
        <table:table-row table:style-name="ro1">
          <table:table-cell/>
          <table:table-cell table:formula="of:=[.A9]*([.B9]+[.C9]/60+[.D9]/3600)" office:value-type="float" office:value="1.95641666666667" calcext:value-type="float">
            <text:p>1,9564166666666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Grandeur L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.38" calcext:value-type="float">
            <text:p>43,38</text:p>
          </table:table-cell>
        </table:table-row>
        <table:table-row table:style-name="ro1">
          <table:table-cell/>
          <table:table-cell table:formula="of:=[.B14]+[.C14]/60+[.D14]/3600" office:value-type="float" office:value="0.0953833333333333" calcext:value-type="float">
            <text:p>0,095383333333333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Grandeur H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.28" calcext:value-type="float">
            <text:p>29,28</text:p>
          </table:table-cell>
        </table:table-row>
        <table:table-row table:style-name="ro1">
          <table:table-cell/>
          <table:table-cell table:formula="of:=[.B19]+[.C19]/60+[.D19]/3600" office:value-type="float" office:value="0.0248" calcext:value-type="float">
            <text:p>0,024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3T13:12:36.690000000</meta:creation-date>
    <dc:date>2022-08-03T23:00:31.368000000</dc:date>
    <meta:editing-duration>PT1H41M47S</meta:editing-duration>
    <meta:editing-cycles>2</meta:editing-cycles>
    <meta:generator>LibreOffice/7.3.4.2$Windows_X86_64 LibreOffice_project/728fec16bd5f605073805c3c9e7c4212a0120dc5</meta:generator>
    <meta:document-statistic meta:table-count="1" meta:cell-count="21" meta:object-count="0"/>
  </office:meta>
</office:document-meta>
</file>